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500000314AA460A1D.png" manifest:media-type="image/png"/>
  <manifest:file-entry manifest:full-path="Pictures/100000000000078000000438398F5550.png" manifest:media-type="image/png"/>
  <manifest:file-entry manifest:full-path="Pictures/1000000100000258000002580FA89E39.png" manifest:media-type="image/png"/>
  <manifest:file-entry manifest:full-path="Pictures/1000000000000BB80000054E02D43DF7.png" manifest:media-type="image/png"/>
  <manifest:file-entry manifest:full-path="Pictures/10000001000009AB0000051932496A67.png" manifest:media-type="image/png"/>
  <manifest:file-entry manifest:full-path="Pictures/10000000000007800000043807882A7D.png" manifest:media-type="image/png"/>
  <manifest:file-entry manifest:full-path="Pictures/TablePreview1.svm" manifest:media-type=""/>
  <manifest:file-entry manifest:full-path="Pictures/10000001000002BD000002BD1847CF18.png" manifest:media-type="image/png"/>
  <manifest:file-entry manifest:full-path="Pictures/1000000100000F4B000005E77F07B76D.png" manifest:media-type="image/png"/>
  <manifest:file-entry manifest:full-path="Pictures/1000000100000500000001A725387209.png" manifest:media-type="image/png"/>
  <manifest:file-entry manifest:full-path="Pictures/1000000100000578000003D9AEAE7AE4.png" manifest:media-type="image/png"/>
  <manifest:file-entry manifest:full-path="Pictures/100000010000032000000320D3A37CE3.png" manifest:media-type="image/png"/>
  <manifest:file-entry manifest:full-path="Pictures/10000B960000487300004873EE5D1189.svg" manifest:media-type="image/svg+xml"/>
  <manifest:file-entry manifest:full-path="Pictures/100000010000070C000005112CBBD9FC.png" manifest:media-type="image/png"/>
  <manifest:file-entry manifest:full-path="Pictures/100009210000085F0000085F28BD616B.svg" manifest:media-type="image/svg+xml"/>
  <manifest:file-entry manifest:full-path="Pictures/1000000100000259000002BD0BB3E380.png" manifest:media-type="image/png"/>
  <manifest:file-entry manifest:full-path="Pictures/100000010000062C000003A016E23AEF.png" manifest:media-type="image/png"/>
  <manifest:file-entry manifest:full-path="Pictures/100000010000069400000307D9C75E8F.png" manifest:media-type="image/png"/>
  <manifest:file-entry manifest:full-path="Pictures/1000000000000780000004382BE75F1E.png" manifest:media-type="image/png"/>
  <manifest:file-entry manifest:full-path="Pictures/100008DF0000056F0000062DFD212A4B.svg" manifest:media-type="image/svg+xml"/>
  <manifest:file-entry manifest:full-path="Pictures/10001F45000052C9000052C927E0C106.svg" manifest:media-type="image/svg+xml"/>
  <manifest:file-entry manifest:full-path="Pictures/10000000000007800000043864294C16.png" manifest:media-type="image/png"/>
  <manifest:file-entry manifest:full-path="Pictures/10000DD000003E1D00004873109B01F5.svg" manifest:media-type="image/svg+xml"/>
  <manifest:file-entry manifest:full-path="Pictures/1000000100000694000003078EDD79A6.png" manifest:media-type="image/png"/>
  <manifest:file-entry manifest:full-path="Pictures/10000001000002C3000002C3545AFB76.png" manifest:media-type="image/png"/>
  <manifest:file-entry manifest:full-path="Pictures/100000010000017F0000017F7CED7F2B.png" manifest:media-type="image/png"/>
  <manifest:file-entry manifest:full-path="Pictures/10000001000007D00000039174B66529.png" manifest:media-type="image/png"/>
  <manifest:file-entry manifest:full-path="Pictures/100000010000032000000320AFA3DF27.png" manifest:media-type="image/png"/>
  <manifest:file-entry manifest:full-path="Pictures/1000000100000320000003204E457F9F.png" manifest:media-type="image/png"/>
  <manifest:file-entry manifest:full-path="Pictures/100005290000279600002796A86259DB.svg" manifest:media-type="image/svg+xml"/>
  <manifest:file-entry manifest:full-path="Pictures/1000000100000694000003078E3ADAC2.png" manifest:media-type="image/png"/>
  <manifest:file-entry manifest:full-path="Pictures/100000010000069400000307856954F0.png" manifest:media-type="image/png"/>
  <manifest:file-entry manifest:full-path="Pictures/1000000100000BB800000387A01D3844.png" manifest:media-type="image/png"/>
  <manifest:file-entry manifest:full-path="Pictures/1000000100000694000003072C1BDAC3.png" manifest:media-type="image/png"/>
  <manifest:file-entry manifest:full-path="Pictures/1000000000000852000003749DB1A611.png" manifest:media-type="image/png"/>
  <manifest:file-entry manifest:full-path="Pictures/100000010000070F00000412650B7BBF.png" manifest:media-type="image/png"/>
  <manifest:file-entry manifest:full-path="Pictures/10000001000000510000005174CE65FF.png" manifest:media-type="image/png"/>
  <manifest:file-entry manifest:full-path="Pictures/1000000100000BB80000038740434AFC.png" manifest:media-type="image/png"/>
  <manifest:file-entry manifest:full-path="Pictures/1000000100000BB800000387430FF8BD.png" manifest:media-type="image/png"/>
  <manifest:file-entry manifest:full-path="Pictures/10000001000000350000003C781B3281.png" manifest:media-type="image/png"/>
  <manifest:file-entry manifest:full-path="Pictures/100000010000032C00000142AE179C1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6.954cm, 13.324cm, 11.078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67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5" style:family="graphic" style:parent-style-name="standard">
      <style:graphic-properties loext:decorative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43cm, 0cm, 5.784cm, 0cm)" draw:image-opacity="100%" style:mirror="none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438cm, 0cm)" draw:image-opacity="100%" style:mirror="none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504cm, 0cm)" draw:image-opacity="100%" style:mirror="none" loext:decorative="false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13.978cm" style:use-optimal-column-width="false"/>
    </style:style>
    <style:style style:name="co3" style:family="table-column">
      <style:table-column-properties style:column-width="18.832cm" style:use-optimal-column-width="false"/>
    </style:style>
    <style:style style:name="ro1" style:family="table-row">
      <style:table-row-properties style:row-height="1.302cm" style:use-optimal-row-height="false"/>
    </style:style>
    <style:style style:name="ce1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text-align="start"/>
      <style:text-properties style:text-position="sub 58%" fo:font-size="48pt" fo:font-weight="bold" style:font-size-asian="48pt" style:font-weight-asian="bold" style:font-size-complex="48pt" style:font-weight-complex="bold"/>
    </style:style>
    <style:style style:name="P17" style:family="paragraph">
      <style:paragraph-properties fo:margin-left="0cm" fo:margin-right="0cm" fo:margin-top="0.42cm" fo:margin-bottom="0.35cm" fo:line-height="150%" fo:text-align="start" fo:text-indent="0cm"/>
      <style:text-properties fo:font-size="10pt" style:font-size-asian="10pt" style:font-size-complex="1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The firewall strateg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The firewall strategy</text:span></text:p>
          </draw:text-box>
        </draw:frame>
        <draw:frame draw:style-name="gr14" draw:text-style-name="P8" draw:layer="layout" svg:width="40.18cm" svg:height="8.115cm" svg:x="2.365cm" svg:y="6.757cm">
          <draw:text-box>
            <text:list text:style-name="L1">
              <text:list-item>
                <text:p xml:id="id21" text:id="id21" text:style-name="P7"><text:span text:style-name="T5">Problem:</text:span><text:span text:style-name="T6"> Default Linux servers accept traffic on all ports.</text:span></text:p>
              </text:list-item>
              <text:list-item>
                <text:p xml:id="id22" text:id="id22" text:style-name="P7"><text:span text:style-name="T5">Solution:</text:span><text:span text:style-name="T6"> Use UFW to block everything by default.</text:span></text:p>
              </text:list-item>
              <text:list-item>
                <text:p xml:id="id23" text:id="id23" text:style-name="P7"><text:span text:style-name="T5">Automation:</text:span><text:span text:style-name="T6"> Use Fail2Ban to block bots instantly.</text:span></text:p>
              </text:list-item>
              <text:list-item>
                <text:p xml:id="id25" text:id="id25" text:style-name="P7"><text:span text:style-name="T5">Safety net:</text:span><text:span text:style-name="T6"> Using the DigitalOcean Recovery Console.</text:span></text:p>
              </text:list-item>
            </text:list>
          </draw:text-box>
        </draw:frame>
        <draw:frame draw:style-name="gr15" draw:text-style-name="P9" xml:id="id24" draw:id="id24" draw:layer="layout" svg:width="9.253cm" svg:height="7.82cm" svg:x="39.007cm" svg:y="20.12cm">
          <draw:image xlink:href="Pictures/1000000100000578000003D9AEAE7AE4.png" xlink:type="simple" xlink:show="embed" xlink:actuate="onLoad" draw:mime-type="image/png">
            <text:p/>
          </draw:image>
        </draw:frame>
        <draw:frame draw:style-name="gr6" draw:text-style-name="P9" xml:id="id26" draw:id="id26" draw:layer="layout" svg:width="6.35cm" svg:height="6.35cm" svg:x="31.75cm" svg:y="21.59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xml:id="id27" draw:id="id27" draw:layer="layout" svg:width="40.64cm" svg:height="18.703cm" svg:x="5.08cm" svg:y="8.524cm">
          <draw:image xlink:href="Pictures/10000001000006940000030785695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8E3ADA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4cm" svg:x="5.025cm" svg:y="8.498cm">
          <draw:image xlink:href="Pictures/1000000100000694000003078EDD7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2C1BDA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3cm" svg:x="5.08cm" svg:y="8.499cm">
          <draw:image xlink:href="Pictures/100000010000069400000307D9C75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"><text:span text:style-name="T1">Module 2: The</text:span></text:p>
              <text:p text:style-name="P1"><text:span text:style-name="T1">application runtime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"><text:span text:style-name="T2">Manual deployment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8" draw:text-style-name="P11" draw:layer="layout" svg:width="40.18cm" svg:height="1.902cm" svg:x="2.365cm" svg:y="6.757cm">
          <draw:text-box>
            <text:list text:style-name="L1">
              <text:list-item>
                <text:p xml:id="id28" text:id="id28" text:style-name="P7"><text:span text:style-name="T6">Move code using </text:span><text:span text:style-name="T5">scp</text:span><text:span text:style-name="T6"> and organize permissions.</text:span></text:p>
              </text:list-item>
            </text:list>
          </draw:text-box>
        </draw:frame>
        <draw:frame draw:style-name="gr6" draw:text-style-name="P9" xml:id="id29" draw:id="id29" draw:layer="layout" svg:width="26.565cm" svg:height="10.252cm" svg:x="21.801cm" svg:y="17.797cm">
          <draw:image xlink:href="Pictures/1000000100000F4B000005E77F07B7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9" draw:text-style-name="P8" draw:layer="layout" svg:width="40.18cm" svg:height="8.115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xml:id="id30" text:id="id30"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xml:id="id31" text:id="id31"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</text:list>
          </draw:text-box>
        </draw:frame>
        <draw:frame draw:style-name="gr6" draw:text-style-name="P9" draw:layer="layout" svg:width="12.278cm" svg:height="12.278cm" svg:x="36.195cm" svg:y="17.78cm">
          <draw:image xlink:href="Pictures/100000010000032000000320D3A37CE3.png" xlink:type="simple" xlink:show="embed" xlink:actuate="onLoad" draw:mime-type="image/png">
            <text:p/>
          </draw:image>
        </draw:frame>
        <draw:frame draw:style-name="gr6" draw:text-style-name="P9" draw:layer="layout" svg:width="9.103cm" svg:height="9.103cm" svg:x="24.765cm" svg:y="19.472cm">
          <draw:image xlink:href="Pictures/100000010000032000000320AFA3D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20" draw:text-style-name="P8" draw:layer="layout" svg:width="40.18cm" svg:height="10.186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  <text:list-item>
                <text:p text:style-name="P7"><text:span text:style-name="T6">Configure </text:span><text:span text:style-name="T5">Gunicorn</text:span><text:span text:style-name="T6"> and </text:span><text:span text:style-name="T5">Supervisor</text:span><text:span text:style-name="T6">.</text:span></text:p>
              </text:list-item>
            </text:list>
          </draw:text-box>
        </draw:frame>
        <draw:frame draw:style-name="gr6" draw:text-style-name="P9" draw:layer="layout" svg:width="15.346cm" svg:height="15.346cm" svg:x="33.02cm" svg:y="15.875cm">
          <draw:image xlink:href="Pictures/1000000100000320000003204E457F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xml:id="id32" draw:id="id32" draw:layer="layout" svg:width="50.799cm" svg:height="15.289cm" svg:x="0.001cm" svg:y="9.376cm">
          <draw:image xlink:href="Pictures/1000000100000BB800000387430FF8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0434A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A01D38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30FF8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Keeping the app alive</text:span></text:p>
          </draw:text-box>
        </draw:frame>
        <draw:frame draw:style-name="gr6" draw:text-style-name="P9" xml:id="id33" draw:id="id33" draw:layer="layout" svg:width="33.517cm" svg:height="19.685cm" svg:x="8.642cm" svg:y="8.255cm">
          <draw:image xlink:href="Pictures/100000010000062C000003A016E23A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"><text:span text:style-name="T1">Module 2: The</text:span></text:p>
            <text:p text:style-name="P1"><text:span text:style-name="T1">application runtim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Reverse proxy &amp; security head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1" draw:text-style-name="P11" draw:layer="layout" svg:width="40.18cm" svg:height="3.973cm" svg:x="2.365cm" svg:y="6.757cm">
          <draw:text-box>
            <text:list text:style-name="L1">
              <text:list-item>
                <text:p xml:id="id34" text:id="id34" text:style-name="P7"><text:span text:style-name="T6">Sync frontend and backend URLs.</text:span></text:p>
              </text:list-item>
              <text:list-item>
                <text:p xml:id="id35" text:id="id35" text:style-name="P7"><text:span text:style-name="T6">Install and configure </text:span><text:span text:style-name="T5">Nginx</text:span><text:span text:style-name="T6">.</text:span></text:p>
              </text:list-item>
            </text:list>
          </draw:text-box>
        </draw:frame>
        <draw:frame draw:style-name="gr6" draw:text-style-name="P9" xml:id="id36" draw:id="id36" draw:layer="layout" svg:width="8.89cm" svg:height="10.105cm" svg:x="39.37cm" svg:y="17.835cm">
          <draw:image xlink:href="Pictures/100008DF0000056F0000062DFD212A4B.svg" xlink:type="simple" xlink:show="embed" xlink:actuate="onLoad" draw:mime-type="image/svg+xml">
            <text:p/>
          </draw:image>
          <draw:image xlink:href="Pictures/10000001000000350000003C781B328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2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</text:list>
          </draw:text-box>
        </draw:frame>
        <draw:frame draw:style-name="gr6" draw:text-style-name="P9" draw:layer="layout" svg:width="27.888cm" svg:height="11.059cm" svg:x="11.456cm" svg:y="16.881cm">
          <draw:image xlink:href="Pictures/100000010000032C00000142AE179C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3" draw:text-style-name="P11" draw:layer="layout" svg:width="40.18cm" svg:height="8.115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  <text:list-item>
                <text:p text:style-name="P7"><text:span text:style-name="T6">Protect users with </text:span><text:span text:style-name="T5">HTTP Security Headers (CSP)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Nginx: The traffic cop</text:span></text:p>
          </draw:text-box>
        </draw:frame>
        <draw:frame draw:style-name="gr6" draw:text-style-name="P9" draw:layer="layout" svg:width="43.166cm" svg:height="17.914cm" svg:x="3.817cm" svg:y="8.486cm">
          <draw:image xlink:href="Pictures/1000000000000852000003749DB1A6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2.05cm">
            <draw:text-box>
              <text:p text:style-name="P1"><text:span text:style-name="T1">Module 3: Data and search</text:span></text:p>
            </draw:text-box>
          </draw:frame>
          <draw:frame draw:style-name="gr2" draw:text-style-name="P3" draw:layer="layout" svg:width="33.655cm" svg:height="2.376cm" svg:x="8.573cm" svg:y="17.324cm">
            <draw:text-box>
              <text:p text:style-name="P12"><text:span text:style-name="T2">Self-hosting Meilisearch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lf-hosting a search engine</text:span></text:p>
          </draw:text-box>
        </draw:frame>
        <draw:frame draw:style-name="gr24" draw:text-style-name="P11" draw:layer="layout" svg:width="40.18cm" svg:height="10.186cm" svg:x="2.365cm" svg:y="6.757cm">
          <draw:text-box>
            <text:list text:style-name="L1">
              <text:list-item>
                <text:p xml:id="id37" text:id="id37" text:style-name="P7"><text:span text:style-name="T5">The engine</text:span><text:span text:style-name="T6">: Meilisearch (a lightning-fast Rust binary).</text:span></text:p>
              </text:list-item>
              <text:list-item>
                <text:p xml:id="id39" text:id="id39" text:style-name="P7"><text:span text:style-name="T5">Security</text:span><text:span text:style-name="T6">: Isolate the database using a </text:span><text:span text:style-name="T5">system user</text:span><text:span text:style-name="T6">.</text:span></text:p>
              </text:list-item>
              <text:list-item>
                <text:p xml:id="id40" text:id="id40" text:style-name="P7"><text:span text:style-name="T5">Automation</text:span><text:span text:style-name="T6">: Run it as a background service using </text:span><text:span text:style-name="T5">systemd</text:span><text:span text:style-name="T6">.</text:span></text:p>
              </text:list-item>
              <text:list-item>
                <text:p xml:id="id41" text:id="id41" text:style-name="P7"><text:span text:style-name="T5">Maintenance</text:span><text:span text:style-name="T6">: Schedule automatic snapshot backups.</text:span></text:p>
              </text:list-item>
              <text:list-item>
                <text:p xml:id="id42" text:id="id42" text:style-name="P7"><text:span text:style-name="T5">Management</text:span><text:span text:style-name="T6">: Use an </text:span><text:span text:style-name="T5">SSH Tunnel</text:span><text:span text:style-name="T6"> to access a visual dashboard securely.</text:span></text:p>
              </text:list-item>
            </text:list>
          </draw:text-box>
        </draw:frame>
        <draw:frame draw:style-name="gr6" draw:text-style-name="P9" xml:id="id38" draw:id="id38" draw:layer="layout" svg:width="13.215cm" svg:height="7.62cm" svg:x="35.045cm" svg:y="20.32cm">
          <draw:image xlink:href="Pictures/100000010000070F00000412650B7BB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What is a system user?</text:span></text:p>
          </draw:text-box>
        </draw:frame>
        <draw:frame draw:style-name="gr25" xml:id="id43" draw:id="id43" draw:layer="layout" svg:width="41.307cm" svg:height="9.569cm" svg:x="2.363cm" svg:y="7.7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8">Feature</text:span></text:p>
              </table:table-cell>
              <table:table-cell>
                <text:p text:style-name="P13"><text:span text:style-name="T8">Standard user</text:span></text:p>
              </table:table-cell>
              <table:table-cell>
                <text:p text:style-name="P13"><text:span text:style-name="T8">System user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Purpose</text:span></text:p>
              </table:table-cell>
              <table:table-cell>
                <text:p text:style-name="P14"><text:span text:style-name="T9">Human administration</text:span></text:p>
              </table:table-cell>
              <table:table-cell>
                <text:p text:style-name="P14"><text:span text:style-name="T9">Running background services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Shell</text:span></text:p>
              </table:table-cell>
              <table:table-cell>
                <text:p text:style-name="P14"><text:span text:style-name="T9">/bin/bash</text:span></text:p>
              </table:table-cell>
              <table:table-cell>
                <text:p text:style-name="P14"><text:span text:style-name="T9">/bin/false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Login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No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Home folder</text:span></text:p>
              </table:table-cell>
              <table:table-cell>
                <text:p text:style-name="P14"><text:span text:style-name="T9">/home/user</text:span></text:p>
              </table:table-cell>
              <table:table-cell>
                <text:p text:style-name="P14"><text:span text:style-name="T9">/var/lib/meilisearch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ystemd vs Supervisor</text:span></text:p>
          </draw:text-box>
        </draw:frame>
        <draw:frame draw:style-name="gr6" draw:text-style-name="P9" draw:layer="layout" svg:width="37.889cm" svg:height="17.295cm" svg:x="4.456cm" svg:y="9.228cm">
          <draw:image xlink:href="Pictures/10000001000007D00000039174B665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6" draw:text-style-name="P11" draw:layer="layout" svg:width="40.18cm" svg:height="3.973cm" svg:x="2.365cm" svg:y="6.757cm">
          <draw:text-box>
            <text:list text:style-name="L1">
              <text:list-item>
                <text:p xml:id="id44" text:id="id44"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xml:id="id46" text:id="id46" text:style-name="P7"><text:span text:style-name="T5">Features</text:span><text:span text:style-name="T6">: Search, add, and edit documents visually.</text:span></text:p>
              </text:list-item>
            </text:list>
          </draw:text-box>
        </draw:frame>
        <draw:frame draw:style-name="gr6" draw:text-style-name="P9" xml:id="id45" draw:id="id45" draw:layer="layout" svg:width="29.845cm" svg:height="15.736cm" svg:x="10.478cm" svg:y="11.97cm">
          <draw:image xlink:href="Pictures/10000001000009AB0000051932496A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7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text:style-name="P7"><text:span text:style-name="T5">Features</text:span><text:span text:style-name="T6">: Search, add, and edit documents visually.</text:span></text:p>
              </text:list-item>
              <text:list-item>
                <text:p text:style-name="P7"><text:span text:style-name="T5">The connection</text:span><text:span text:style-name="T6">: Secure access via SSH Tunneling (no open ports).</text:span></text:p>
              </text:list-item>
            </text:list>
          </draw:text-box>
        </draw:frame>
        <draw:frame draw:style-name="gr6" draw:text-style-name="P9" draw:layer="layout" svg:width="31.868cm" svg:height="14.425cm" svg:x="9.466cm" svg:y="14.785cm">
          <draw:image xlink:href="Pictures/1000000000000BB80000054E02D43D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Domains and SSL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Domains &amp; SSL</text:span></text:p>
          </draw:text-box>
        </draw:frame>
        <draw:frame draw:style-name="gr28" draw:text-style-name="P11" draw:layer="layout" svg:width="40.18cm" svg:height="10.186cm" svg:x="2.365cm" svg:y="6.757cm">
          <draw:text-box>
            <text:list text:style-name="L1">
              <text:list-item>
                <text:p xml:id="id47" text:id="id47" text:style-name="P7"><text:span text:style-name="T6">Purchase a </text:span><text:span text:style-name="T5">custom domain</text:span><text:span text:style-name="T6">.</text:span></text:p>
              </text:list-item>
              <text:list-item>
                <text:p xml:id="id48" text:id="id48" text:style-name="P7"><text:span text:style-name="T6">Configure </text:span><text:span text:style-name="T5">DNS Records</text:span><text:span text:style-name="T6"> (A and CNAME).</text:span></text:p>
              </text:list-item>
              <text:list-item>
                <text:p xml:id="id49" text:id="id49" text:style-name="P7"><text:span text:style-name="T6">Install free </text:span><text:span text:style-name="T5">SSL certificates</text:span><text:span text:style-name="T6"> via Let's Encrypt.</text:span></text:p>
              </text:list-item>
              <text:list-item>
                <text:p xml:id="id51" text:id="id51" text:style-name="P7"><text:span text:style-name="T6">Automate 90-day </text:span><text:span text:style-name="T5">renewals</text:span><text:span text:style-name="T6"> using Cron.</text:span></text:p>
              </text:list-item>
            </text:list>
          </draw:text-box>
        </draw:frame>
        <draw:frame draw:style-name="gr29" draw:text-style-name="P9" xml:id="id50" draw:id="id50" draw:layer="layout" svg:width="20.408cm" svg:height="5.714cm" svg:x="27.217cm" svg:y="22.225cm">
          <draw:image xlink:href="Pictures/1000000100000258000002580FA89E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DNS works</text:span></text:p>
          </draw:text-box>
        </draw:frame>
        <draw:frame draw:style-name="gr6" draw:text-style-name="P9" xml:id="id52" draw:id="id52" draw:layer="layout" svg:width="36.314cm" svg:height="20.426cm" svg:x="7.243cm" svg:y="7.704cm">
          <draw:image xlink:href="Pictures/100000000000078000000438398F555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The CDN layer and caching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Global speed &amp; Caching</text:span></text:p>
          </draw:text-box>
        </draw:frame>
        <draw:frame draw:style-name="gr30" draw:text-style-name="P11" draw:layer="layout" svg:width="40.18cm" svg:height="10.186cm" svg:x="2.365cm" svg:y="6.757cm">
          <draw:text-box>
            <text:list text:style-name="L1">
              <text:list-item>
                <text:p xml:id="id53" text:id="id53" text:style-name="P7"><text:span text:style-name="T6">Route traffic through a </text:span><text:span text:style-name="T5">Content Delivery Network (CDN)</text:span><text:span text:style-name="T6">.</text:span></text:p>
              </text:list-item>
              <text:list-item>
                <text:p xml:id="id55" text:id="id55" text:style-name="P7"><text:span text:style-name="T6">Configure strict </text:span><text:span text:style-name="T5">end-to-end SSL encryption</text:span><text:span text:style-name="T6">.</text:span></text:p>
              </text:list-item>
              <text:list-item>
                <text:p xml:id="id56" text:id="id56" text:style-name="P7"><text:span text:style-name="T6">Unmask visitor IP addresses in Nginx.</text:span></text:p>
              </text:list-item>
              <text:list-item>
                <text:p xml:id="id57" text:id="id57" text:style-name="P7"><text:span text:style-name="T6">Implement a </text:span><text:span text:style-name="T5">caching strategy</text:span><text:span text:style-name="T6"> for SPAs.</text:span></text:p>
              </text:list-item>
            </text:list>
          </draw:text-box>
        </draw:frame>
        <draw:frame draw:style-name="gr6" draw:text-style-name="P9" xml:id="id54" draw:id="id54" draw:layer="layout" svg:width="19.05cm" svg:height="6.295cm" svg:x="29.21cm" svg:y="21.645cm">
          <draw:image xlink:href="Pictures/1000000100000500000001A72538720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Beating the speed of light</text:span></text:p>
          </draw:text-box>
        </draw:frame>
        <draw:frame draw:style-name="gr6" draw:text-style-name="P9" xml:id="id58" draw:id="id58" draw:layer="layout" svg:width="42.344cm" svg:height="23.818cm" svg:x="4.228cm" svg:y="6.487cm">
          <draw:image xlink:href="Pictures/10000000000007800000043807882A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Beating the speed of light</text:span></text:p>
          </draw:text-box>
        </draw:frame>
        <draw:frame draw:style-name="gr6" draw:text-style-name="P9" draw:layer="layout" svg:width="40.073cm" svg:height="15.624cm" svg:x="5.364cm" svg:y="8.871cm">
          <draw:image xlink:href="Pictures/10000000000007E500000314AA460A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The real IP problem</text:span></text:p>
          </draw:text-box>
        </draw:frame>
        <draw:frame draw:style-name="gr31" draw:text-style-name="P9" xml:id="id59" draw:id="id59" draw:layer="layout" svg:width="41.215cm" svg:height="10.657cm" svg:x="4.793cm" svg:y="6.487cm">
          <draw:image xlink:href="Pictures/1000000000000780000004382BE75F1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The real IP problem</text:span></text:p>
          </draw:text-box>
        </draw:frame>
        <draw:frame draw:style-name="gr6" draw:text-style-name="P9" draw:layer="layout" svg:width="41.215cm" svg:height="23.183cm" svg:x="4.793cm" svg:y="6.487cm">
          <draw:image xlink:href="Pictures/1000000000000780000004382BE75F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Vulnerability scanning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Testing your defenses</text:span></text:p>
          </draw:text-box>
        </draw:frame>
        <draw:frame draw:style-name="gr32" draw:text-style-name="P11" draw:layer="layout" svg:width="40.18cm" svg:height="10.186cm" svg:x="2.365cm" svg:y="6.757cm">
          <draw:text-box>
            <text:list text:style-name="L1">
              <text:list-item>
                <text:p xml:id="id60" text:id="id60" text:style-name="P7"><text:span text:style-name="T6">Understand and fix the </text:span><text:span text:style-name="T5">Soft 404</text:span><text:span text:style-name="T6"> vulnerability.</text:span></text:p>
              </text:list-item>
              <text:list-item>
                <text:p xml:id="id61" text:id="id61" text:style-name="P7"><text:span text:style-name="T6">Configure Nginx to instantly </text:span><text:span text:style-name="T5">block malicious bots</text:span><text:span text:style-name="T6">.</text:span></text:p>
              </text:list-item>
              <text:list-item>
                <text:p xml:id="id62" text:id="id62" text:style-name="P7"><text:span text:style-name="T6">Use nmap to </text:span><text:span text:style-name="T5">scan your firewall</text:span><text:span text:style-name="T6"> from the outsid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Fixing the SPA trap (Soft 404s)</text:span></text:p>
          </draw:text-box>
        </draw:frame>
        <draw:frame draw:style-name="gr33" draw:text-style-name="P9" xml:id="id63" draw:id="id63" draw:layer="layout" svg:width="38.957cm" svg:height="10.022cm" svg:x="5.922cm" svg:y="6.487cm">
          <draw:image xlink:href="Pictures/10000000000007800000043864294C1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Fixing the SPA trap (Soft 404s)</text:span></text:p>
          </draw:text-box>
        </draw:frame>
        <draw:frame draw:style-name="gr6" draw:text-style-name="P9" draw:layer="layout" svg:width="38.957cm" svg:height="21.913cm" svg:x="5.922cm" svg:y="6.487cm">
          <draw:image xlink:href="Pictures/10000000000007800000043864294C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2"><text:span text:style-name="T1">Module 5: The automation pipelin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Local hygien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ing your local </text:span><text:span text:style-name="T3">workflow</text:span></text:p>
          </draw:text-box>
        </draw:frame>
        <draw:frame draw:style-name="gr34" draw:text-style-name="P11" draw:layer="layout" svg:width="40.18cm" svg:height="10.186cm" svg:x="2.365cm" svg:y="6.757cm">
          <draw:text-box>
            <text:list text:style-name="L1">
              <text:list-item>
                <text:p xml:id="id64" text:id="id64" text:style-name="P17"><text:span text:style-name="T6">Protect the </text:span><text:span text:style-name="T5">main</text:span><text:span text:style-name="T6"> branch using </text:span><text:span text:style-name="T5">GitHub Rulesets</text:span><text:span text:style-name="T6">.</text:span></text:p>
              </text:list-item>
              <text:list-item>
                <text:p xml:id="id65" text:id="id65" text:style-name="P17"><text:span text:style-name="T6">Automate local checks with </text:span><text:span text:style-name="T5">pre-commit</text:span><text:span text:style-name="T6">.</text:span></text:p>
              </text:list-item>
              <text:list-item>
                <text:p xml:id="id66" text:id="id66" text:style-name="P17"><text:span text:style-name="T6">Lint and format Python using </text:span><text:span text:style-name="T5">Ruff</text:span><text:span text:style-name="T6">.</text:span></text:p>
              </text:list-item>
              <text:list-item>
                <text:p xml:id="id67" text:id="id67" text:style-name="P17"><text:span text:style-name="T6">Lint and format Vue.js using </text:span><text:span text:style-name="T5">ESLint &amp; Prettier</text:span><text:span text:style-name="T6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4-29T21:10:21.666003158</dc:date>
    <meta:editing-duration>P2DT21H28M55S</meta:editing-duration>
    <meta:editing-cycles>476</meta:editing-cycles>
    <meta:generator>LibreOffice/25.8.6.2$Linux_X86_64 LibreOffice_project/580$Build-2</meta:generator>
    <meta:document-statistic meta:object-count="251"/>
  </office:meta>
</office:document-meta>
</file>