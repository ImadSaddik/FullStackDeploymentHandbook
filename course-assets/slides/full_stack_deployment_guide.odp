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314AA460A1D.png" manifest:media-type="image/png"/>
  <manifest:file-entry manifest:full-path="Pictures/10000001000007800000043856634D87.png" manifest:media-type="image/png"/>
  <manifest:file-entry manifest:full-path="Pictures/100000000000078000000438398F5550.png" manifest:media-type="image/png"/>
  <manifest:file-entry manifest:full-path="Pictures/1000000100000258000002580FA89E39.png" manifest:media-type="image/png"/>
  <manifest:file-entry manifest:full-path="Pictures/1000000000000BB80000054E02D43DF7.png" manifest:media-type="image/png"/>
  <manifest:file-entry manifest:full-path="Pictures/10000001000007D20000020C538A4647.png" manifest:media-type="image/png"/>
  <manifest:file-entry manifest:full-path="Pictures/10000001000009AB0000051932496A67.png" manifest:media-type="image/png"/>
  <manifest:file-entry manifest:full-path="Pictures/10000000000007800000043807882A7D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00000001A725387209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00000000780000004382BE75F1E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000000007800000043864294C16.png" manifest:media-type="image/png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3cm, 0cm, 5.784cm, 0cm)" draw:image-opacity="100%" style:mirror="non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438cm, 0cm)" draw:image-opacity="100%" style:mirror="none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504cm, 0cm)" draw:image-opacity="100%" style:mirror="none"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start"/>
      <style:text-properties style:text-position="sub 58%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visual dashboard securely.</text:span></text:p>
              </text:list-item>
            </text:list>
          </draw:text-box>
        </draw:frame>
        <draw:frame draw:style-name="gr6" draw:text-style-name="P9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Feature</text:span></text:p>
              </table:table-cell>
              <table:table-cell>
                <text:p text:style-name="P13"><text:span text:style-name="T8">Standard user</text:span></text:p>
              </table:table-cell>
              <table:table-cell>
                <text:p text:style-name="P13"><text:span text:style-name="T8">System user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Purpose</text:span></text:p>
              </table:table-cell>
              <table:table-cell>
                <text:p text:style-name="P14"><text:span text:style-name="T9">Human administration</text:span></text:p>
              </table:table-cell>
              <table:table-cell>
                <text:p text:style-name="P14"><text:span text:style-name="T9">Running background services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Shell</text:span></text:p>
              </table:table-cell>
              <table:table-cell>
                <text:p text:style-name="P14"><text:span text:style-name="T9">/bin/bash</text:span></text:p>
              </table:table-cell>
              <table:table-cell>
                <text:p text:style-name="P14"><text:span text:style-name="T9">/bin/false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Login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No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Home folder</text:span></text:p>
              </table:table-cell>
              <table:table-cell>
                <text:p text:style-name="P14"><text:span text:style-name="T9">/home/user</text:span></text:p>
              </table:table-cell>
              <table:table-cell>
                <text:p text:style-name="P14"><text:span text:style-name="T9">/var/lib/meilisearc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ystemd vs Supervisor</text:span></text:p>
          </draw:text-box>
        </draw:frame>
        <draw:frame draw:style-name="gr6" draw:text-style-name="P9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6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6" draw:text-style-name="P9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6" draw:text-style-name="P9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Domains and SSL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Domains &amp; SSL</text:span></text:p>
          </draw:text-box>
        </draw:frame>
        <draw:frame draw:style-name="gr28" draw:text-style-name="P11" draw:layer="layout" svg:width="40.18cm" svg:height="10.186cm" svg:x="2.365cm" svg:y="6.757cm">
          <draw:text-box>
            <text:list text:style-name="L1">
              <text:list-item>
                <text:p xml:id="id47" text:id="id47" text:style-name="P7"><text:span text:style-name="T6">Purchase a </text:span><text:span text:style-name="T5">custom domain</text:span><text:span text:style-name="T6">.</text:span></text:p>
              </text:list-item>
              <text:list-item>
                <text:p xml:id="id48" text:id="id48" text:style-name="P7"><text:span text:style-name="T6">Configure </text:span><text:span text:style-name="T5">DNS Records</text:span><text:span text:style-name="T6"> (A and CNAME).</text:span></text:p>
              </text:list-item>
              <text:list-item>
                <text:p xml:id="id49" text:id="id49" text:style-name="P7"><text:span text:style-name="T6">Install free </text:span><text:span text:style-name="T5">SSL certificates</text:span><text:span text:style-name="T6"> via Let's Encrypt.</text:span></text:p>
              </text:list-item>
              <text:list-item>
                <text:p xml:id="id51" text:id="id51" text:style-name="P7"><text:span text:style-name="T6">Automate 90-day </text:span><text:span text:style-name="T5">renewals</text:span><text:span text:style-name="T6"> using Cron.</text:span></text:p>
              </text:list-item>
            </text:list>
          </draw:text-box>
        </draw:frame>
        <draw:frame draw:style-name="gr29" draw:text-style-name="P9" xml:id="id50" draw:id="id50" draw:layer="layout" svg:width="20.408cm" svg:height="5.714cm" svg:x="27.217cm" svg:y="22.225cm">
          <draw:image xlink:href="Pictures/1000000100000258000002580FA89E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How DNS works</text:span></text:p>
          </draw:text-box>
        </draw:frame>
        <draw:frame draw:style-name="gr6" draw:text-style-name="P9" xml:id="id52" draw:id="id52" draw:layer="layout" svg:width="36.314cm" svg:height="20.426cm" svg:x="7.243cm" svg:y="7.704cm">
          <draw:image xlink:href="Pictures/100000000000078000000438398F555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The CDN layer and cach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Global speed &amp; Caching</text:span></text:p>
          </draw:text-box>
        </draw:frame>
        <draw:frame draw:style-name="gr30" draw:text-style-name="P11" draw:layer="layout" svg:width="40.18cm" svg:height="10.186cm" svg:x="2.365cm" svg:y="6.757cm">
          <draw:text-box>
            <text:list text:style-name="L1">
              <text:list-item>
                <text:p xml:id="id53" text:id="id53" text:style-name="P7"><text:span text:style-name="T6">Route traffic through a </text:span><text:span text:style-name="T5">Content Delivery Network (CDN)</text:span><text:span text:style-name="T6">.</text:span></text:p>
              </text:list-item>
              <text:list-item>
                <text:p xml:id="id55" text:id="id55" text:style-name="P7"><text:span text:style-name="T6">Configure strict </text:span><text:span text:style-name="T5">end-to-end SSL encryption</text:span><text:span text:style-name="T6">.</text:span></text:p>
              </text:list-item>
              <text:list-item>
                <text:p xml:id="id56" text:id="id56" text:style-name="P7"><text:span text:style-name="T6">Unmask visitor IP addresses in Nginx.</text:span></text:p>
              </text:list-item>
              <text:list-item>
                <text:p xml:id="id57" text:id="id57" text:style-name="P7"><text:span text:style-name="T6">Implement a </text:span><text:span text:style-name="T5">caching strategy</text:span><text:span text:style-name="T6"> for SPAs.</text:span></text:p>
              </text:list-item>
            </text:list>
          </draw:text-box>
        </draw:frame>
        <draw:frame draw:style-name="gr6" draw:text-style-name="P9" xml:id="id54" draw:id="id54" draw:layer="layout" svg:width="19.05cm" svg:height="6.295cm" svg:x="29.21cm" svg:y="21.645cm">
          <draw:image xlink:href="Pictures/1000000100000500000001A72538720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xml:id="id58" draw:id="id58" draw:layer="layout" svg:width="42.344cm" svg:height="23.818cm" svg:x="4.228cm" svg:y="6.487cm">
          <draw:image xlink:href="Pictures/10000000000007800000043807882A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draw:layer="layout" svg:width="40.073cm" svg:height="15.624cm" svg:x="5.364cm" svg:y="8.871cm">
          <draw:image xlink:href="Pictures/10000000000007E500000314AA460A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31" draw:text-style-name="P9" xml:id="id59" draw:id="id59" draw:layer="layout" svg:width="41.215cm" svg:height="10.657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6" draw:text-style-name="P9" draw:layer="layout" svg:width="41.215cm" svg:height="23.183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Vulnerability scann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esting your defenses</text:span></text:p>
          </draw:text-box>
        </draw:frame>
        <draw:frame draw:style-name="gr32" draw:text-style-name="P11" draw:layer="layout" svg:width="40.18cm" svg:height="10.186cm" svg:x="2.365cm" svg:y="6.757cm">
          <draw:text-box>
            <text:list text:style-name="L1">
              <text:list-item>
                <text:p xml:id="id60" text:id="id60" text:style-name="P7"><text:span text:style-name="T6">Understand and fix the </text:span><text:span text:style-name="T5">Soft 404</text:span><text:span text:style-name="T6"> vulnerability.</text:span></text:p>
              </text:list-item>
              <text:list-item>
                <text:p xml:id="id61" text:id="id61" text:style-name="P7"><text:span text:style-name="T6">Configure Nginx to instantly </text:span><text:span text:style-name="T5">block malicious bots</text:span><text:span text:style-name="T6">.</text:span></text:p>
              </text:list-item>
              <text:list-item>
                <text:p xml:id="id62" text:id="id62" text:style-name="P7"><text:span text:style-name="T6">Use nmap to </text:span><text:span text:style-name="T5">scan your firewall</text:span><text:span text:style-name="T6"> from the outsid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33" draw:text-style-name="P9" xml:id="id63" draw:id="id63" draw:layer="layout" svg:width="38.957cm" svg:height="10.022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6" draw:text-style-name="P9" draw:layer="layout" svg:width="38.957cm" svg:height="21.913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Local hygien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ing your local workflow</text:span></text:p>
          </draw:text-box>
        </draw:frame>
        <draw:frame draw:style-name="gr34" draw:text-style-name="P11" draw:layer="layout" svg:width="40.18cm" svg:height="10.186cm" svg:x="2.365cm" svg:y="6.757cm">
          <draw:text-box>
            <text:list text:style-name="L1">
              <text:list-item>
                <text:p xml:id="id64" text:id="id64" text:style-name="P7"><text:span text:style-name="T6">Protect the </text:span><text:span text:style-name="T5">main</text:span><text:span text:style-name="T6"> branch using </text:span><text:span text:style-name="T5">GitHub Rulesets</text:span><text:span text:style-name="T6">.</text:span></text:p>
              </text:list-item>
              <text:list-item>
                <text:p xml:id="id65" text:id="id65" text:style-name="P7"><text:span text:style-name="T6">Automate local checks with </text:span><text:span text:style-name="T5">pre-commit</text:span><text:span text:style-name="T6">.</text:span></text:p>
              </text:list-item>
              <text:list-item>
                <text:p xml:id="id66" text:id="id66" text:style-name="P7"><text:span text:style-name="T6">Lint and format Python using </text:span><text:span text:style-name="T5">Ruff</text:span><text:span text:style-name="T6">.</text:span></text:p>
              </text:list-item>
              <text:list-item>
                <text:p xml:id="id67" text:id="id67" text:style-name="P7"><text:span text:style-name="T6">Lint and format Vue.js using </text:span><text:span text:style-name="T5">ESLint &amp; Prettier</text:span><text:span text:style-name="T6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Continuous integr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he cloud gatekeeper</text:span></text:p>
          </draw:text-box>
        </draw:frame>
        <draw:frame draw:style-name="gr35" draw:text-style-name="P11" draw:layer="layout" svg:width="40.18cm" svg:height="10.186cm" svg:x="2.365cm" svg:y="6.757cm">
          <draw:text-box>
            <text:list text:style-name="L1">
              <text:list-item>
                <text:p xml:id="id68" text:id="id68" text:style-name="P7"><text:span text:style-name="T6">What is Continuous Integration (CI)?</text:span></text:p>
              </text:list-item>
              <text:list-item>
                <text:p xml:id="id69" text:id="id69" text:style-name="P7"><text:span text:style-name="T6">Build modular, reusable workflows.</text:span></text:p>
              </text:list-item>
              <text:list-item>
                <text:p xml:id="id70" text:id="id70" text:style-name="P7"><text:span text:style-name="T6">Automate linting, formatting, and unit tests.</text:span></text:p>
              </text:list-item>
              <text:list-item>
                <text:p xml:id="id71" text:id="id71" text:style-name="P7"><text:span text:style-name="T6">Block bad code using GitHub Status Check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6" draw:text-style-name="P9" xml:id="id72" draw:id="id72" draw:layer="layout" svg:width="44.835cm" svg:height="11.734cm" svg:x="2.983cm" svg:y="11.126cm">
          <draw:image xlink:href="Pictures/10000001000007D20000020C538A4647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The pipe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Automated security scann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he security guardrails</text:span></text:p>
          </draw:text-box>
        </draw:frame>
        <draw:frame draw:style-name="gr36" draw:text-style-name="P11" draw:layer="layout" svg:width="40.18cm" svg:height="10.186cm" svg:x="2.365cm" svg:y="6.757cm">
          <draw:text-box>
            <text:list text:style-name="L1">
              <text:list-item>
                <text:p xml:id="id73" text:id="id73" text:style-name="P7"><text:span text:style-name="T6">Understand the </text:span><text:span text:style-name="T5">"Shift Left"</text:span><text:span text:style-name="T6"> security model.</text:span></text:p>
              </text:list-item>
              <text:list-item>
                <text:p xml:id="id74" text:id="id74" text:style-name="P7"><text:span text:style-name="T6">Run Software Composition Analysis (</text:span><text:span text:style-name="T5">SCA</text:span><text:span text:style-name="T6">).</text:span></text:p>
              </text:list-item>
              <text:list-item>
                <text:p xml:id="id75" text:id="id75" text:style-name="P7"><text:span text:style-name="T6">Run Static Application Security Testing (</text:span><text:span text:style-name="T5">SAST</text:span><text:span text:style-name="T6">).</text:span></text:p>
              </text:list-item>
              <text:list-item>
                <text:p xml:id="id76" text:id="id76" text:style-name="P7"><text:span text:style-name="T6">Implement a </text:span><text:span text:style-name="T5">"Fail Fast"</text:span><text:span text:style-name="T6"> pipeline strateg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hifting security left</text:span></text:p>
          </draw:text-box>
        </draw:frame>
        <draw:frame draw:style-name="gr6" draw:text-style-name="P9" xml:id="id77" draw:id="id77" draw:layer="layout" svg:width="38.957cm" svg:height="21.913cm" svg:x="5.922cm" svg:y="7.487cm">
          <draw:image xlink:href="Pictures/10000001000007800000043856634D8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Advanced testing &amp; DAS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esting a living system</text:span></text:p>
          </draw:text-box>
        </draw:frame>
        <draw:frame draw:style-name="gr37" draw:text-style-name="P11" draw:layer="layout" svg:width="40.18cm" svg:height="10.186cm" svg:x="2.365cm" svg:y="6.757cm">
          <draw:text-box>
            <text:list text:style-name="L1">
              <text:list-item>
                <text:p xml:id="id78" text:id="id78" text:style-name="P7"><text:span text:style-name="T6">Write </text:span><text:span text:style-name="T5">integration tests</text:span><text:span text:style-name="T6"> with a live Meilisearch instance.</text:span></text:p>
              </text:list-item>
              <text:list-item>
                <text:p xml:id="id79" text:id="id79" text:style-name="P7"><text:span text:style-name="T6">Simulate real users with </text:span><text:span text:style-name="T5">Playwright E2E tests</text:span><text:span text:style-name="T6">.</text:span></text:p>
              </text:list-item>
              <text:list-item>
                <text:p xml:id="id80" text:id="id80" text:style-name="P7"><text:span text:style-name="T6">Run Dynamic Application Security Testing (</text:span><text:span text:style-name="T5">DAST</text:span><text:span text:style-name="T6">) with </text:span><text:span text:style-name="T5">OWASP ZAP</text:span><text:span text:style-name="T6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6-07T18:54:13.372389586</dc:date>
    <meta:editing-duration>P2DT22H36M</meta:editing-duration>
    <meta:editing-cycles>486</meta:editing-cycles>
    <meta:generator>LibreOffice/25.8.7.3$Linux_X86_64 LibreOffice_project/580$Build-3</meta:generator>
    <meta:document-statistic meta:object-count="283"/>
  </office:meta>
</office:document-meta>
</file>